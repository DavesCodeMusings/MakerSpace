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F30000029987CDE48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paragraph-rsid="00193b4b"/>
    </style:style>
    <style:style style:name="P2" style:family="paragraph" style:parent-style-name="Text_20_body">
      <style:text-properties officeooo:rsid="0027fc6b" officeooo:paragraph-rsid="0027fc6b"/>
    </style:style>
    <style:style style:name="P3" style:family="paragraph" style:parent-style-name="Text_20_body">
      <style:text-properties officeooo:rsid="000ffd0f" officeooo:paragraph-rsid="000ffd0f"/>
    </style:style>
    <style:style style:name="P4" style:family="paragraph" style:parent-style-name="Text_20_body">
      <style:text-properties officeooo:rsid="00191f0e" officeooo:paragraph-rsid="00191f0e"/>
    </style:style>
    <style:style style:name="P5" style:family="paragraph" style:parent-style-name="Text_20_body">
      <style:text-properties officeooo:rsid="0010c618" officeooo:paragraph-rsid="0010c618"/>
    </style:style>
    <style:style style:name="P6" style:family="paragraph" style:parent-style-name="Text_20_body">
      <style:text-properties officeooo:rsid="0018bb43" officeooo:paragraph-rsid="0018bb43"/>
    </style:style>
    <style:style style:name="P7" style:family="paragraph" style:parent-style-name="Text_20_body">
      <style:text-properties officeooo:rsid="00216483" officeooo:paragraph-rsid="00216483"/>
    </style:style>
    <style:style style:name="P8" style:family="paragraph" style:parent-style-name="Table_20_Contents">
      <style:text-properties fo:font-size="10pt" fo:font-style="italic" officeooo:rsid="0015d6ae" officeooo:paragraph-rsid="0015d6ae" style:font-size-asian="10pt" style:font-style-asian="italic" style:font-size-complex="10pt" style:font-style-complex="italic"/>
    </style:style>
    <style:style style:name="P9" style:family="paragraph" style:parent-style-name="Table_20_Contents">
      <style:text-properties officeooo:rsid="00103714" officeooo:paragraph-rsid="00103714"/>
    </style:style>
    <style:style style:name="P10" style:family="paragraph" style:parent-style-name="Text_20_body">
      <style:text-properties officeooo:paragraph-rsid="001784b5"/>
    </style:style>
    <style:style style:name="P11" style:family="paragraph" style:parent-style-name="Text_20_body">
      <style:text-properties officeooo:rsid="00193b4b" officeooo:paragraph-rsid="001fc280"/>
    </style:style>
    <style:style style:name="P12" style:family="paragraph" style:parent-style-name="Text_20_body">
      <style:text-properties officeooo:rsid="001fc280" officeooo:paragraph-rsid="001fc280"/>
    </style:style>
    <style:style style:name="P13" style:family="paragraph" style:parent-style-name="Text_20_body">
      <style:text-properties style:font-name="Liberation Serif" officeooo:rsid="00216483" officeooo:paragraph-rsid="00216483"/>
    </style:style>
    <style:style style:name="P14" style:family="paragraph" style:parent-style-name="Table_20_Contents">
      <style:text-properties officeooo:rsid="0024c796" officeooo:paragraph-rsid="0024c796"/>
    </style:style>
    <style:style style:name="P15" style:family="paragraph" style:parent-style-name="Heading_20_1">
      <style:text-properties officeooo:rsid="0024c796" officeooo:paragraph-rsid="0024c796"/>
    </style:style>
    <style:style style:name="P16" style:family="paragraph" style:parent-style-name="Text_20_body">
      <style:text-properties officeooo:rsid="0024f086" officeooo:paragraph-rsid="0024f086"/>
    </style:style>
    <style:style style:name="P17" style:family="paragraph">
      <style:text-properties fo:font-family="'Liberation Sans'" style:font-family-generic="roman" style:font-pitch="variable" fo:font-size="1pt" style:font-family-asian="'Liberation Sans'" style:font-family-generic-asian="system" style:font-pitch-asian="variable" style:font-family-complex="'Liberation Sans'" style:font-family-generic-complex="system" style:font-pitch-complex="variable"/>
    </style:style>
    <style:style style:name="P18" style:family="paragraph">
      <loext:graphic-properties draw:fill="solid" draw:fill-color="#c0c0c0" draw:opacity="50%"/>
      <style:paragraph-properties style:writing-mode="lr-tb"/>
      <style:text-properties fo:font-family="'Liberation Sans'" style:font-family-generic="roman" style:font-pitch="variable" fo:font-size="1pt" style:font-family-asian="'Liberation Sans'" style:font-family-generic-asian="system" style:font-pitch-asian="variable" style:font-family-complex="'Liberation Sans'" style:font-family-generic-complex="system" style:font-pitch-complex="variable"/>
    </style:style>
    <style:style style:name="T1" style:family="text">
      <style:text-properties officeooo:rsid="000bc7f9"/>
    </style:style>
    <style:style style:name="T2" style:family="text">
      <style:text-properties officeooo:rsid="000d12ba"/>
    </style:style>
    <style:style style:name="T3" style:family="text">
      <style:text-properties officeooo:rsid="002bb4c4"/>
    </style:style>
    <style:style style:name="T4" style:family="text">
      <style:text-properties officeooo:rsid="00193b4b"/>
    </style:style>
    <style:style style:name="T5" style:family="text">
      <style:text-properties officeooo:rsid="00191f0e"/>
    </style:style>
    <style:style style:name="T6" style:family="text">
      <style:text-properties officeooo:rsid="002d3199"/>
    </style:style>
    <style:style style:name="T7" style:family="text">
      <style:text-properties officeooo:rsid="001ec8f5"/>
    </style:style>
    <style:style style:name="T8" style:family="text">
      <style:text-properties officeooo:rsid="002ab9c6"/>
    </style:style>
    <style:style style:name="T9" style:family="text">
      <style:text-properties officeooo:rsid="00295769"/>
    </style:style>
    <style:style style:name="T10" style:family="text">
      <style:text-properties officeooo:rsid="002bb696"/>
    </style:style>
    <style:style style:name="T11" style:family="text">
      <style:text-properties officeooo:rsid="001784b5"/>
    </style:style>
    <style:style style:name="T12" style:family="text">
      <style:text-properties officeooo:rsid="001b1e74"/>
    </style:style>
    <style:style style:name="T13" style:family="text">
      <style:text-properties fo:font-family="'Liberation Serif'" style:font-family-generic="roman" officeooo:rsid="00191f0e"/>
    </style:style>
    <style:style style:name="T14" style:family="text">
      <style:text-properties fo:font-family="'Liberation Serif'" style:font-family-generic="roman" officeooo:rsid="00193b4b"/>
    </style:style>
    <style:style style:name="T15" style:family="text">
      <style:text-properties officeooo:rsid="001cf249"/>
    </style:style>
    <style:style style:name="T16" style:family="text">
      <style:text-properties officeooo:rsid="000ffd0f"/>
    </style:style>
    <style:style style:name="T17" style:family="text">
      <style:text-properties officeooo:rsid="0018bb43"/>
    </style:style>
    <style:style style:name="T18" style:family="text">
      <style:text-properties officeooo:rsid="001fc280"/>
    </style:style>
    <style:style style:name="T19" style:family="text">
      <style:text-properties officeooo:rsid="001a4b5e"/>
    </style:style>
    <style:style style:name="T20" style:family="text">
      <style:text-properties officeooo:rsid="00216483"/>
    </style:style>
    <style:style style:name="T21" style:family="text">
      <style:text-properties officeooo:rsid="0022d995"/>
    </style:style>
    <style:style style:name="T22" style:family="text">
      <style:text-properties fo:font-family="'Liberation Serif'" style:font-family-generic="roman"/>
    </style:style>
    <style:style style:name="T23" style:family="text">
      <style:text-properties style:font-name="Liberation Serif"/>
    </style:style>
    <style:style style:name="T24" style:family="text">
      <style:text-properties style:font-name="Liberation Serif" officeooo:rsid="00216483"/>
    </style:style>
    <style:style style:name="T25" style:family="text">
      <style:text-properties fo:font-family="'Liberation Serif'" style:font-family-generic="roman" officeooo:rsid="0021648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solid" draw:fill-color="#c0c0c0" draw:opacity="50%" draw:auto-grow-height="false" draw:auto-grow-width="false" fo:min-height="0.7689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0.8126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0.49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D 101</text:p>
      <text:p text:style-name="Subtitle"><text:span text:style-name="T1">Explor</text:span><text:span text:style-name="T2">ing</text:span> the basics of LED <text:span text:style-name="T2">circuit</text:span>s</text:p>
      <text:p text:style-name="P1"><text:span text:style-name="T1">In this activity, </text:span><text:span text:style-name="T3">we’ll</text:span><text:span text:style-name="T1"> learn how to hook up a Light Emitting Diode (LED) to power and make it </text:span><text:span text:style-name="T2">glow</text:span><text:span text:style-name="T1">. </text:span><text:span text:style-name="T3">We’ll</text:span><text:span text:style-name="T1"> also </text:span><text:span text:style-name="T2">learn why a resistor is required in the LED circuit and how to calculate the proper resistor value.</text:span></text:p>
      <text:p text:style-name="P1"><text:span text:style-name="T4">Secondary</text:span><text:span text:style-name="T5"> skills </text:span><text:span text:style-name="T3">we’ll </text:span><text:span text:style-name="T5">learn are: how to use a multimeter, how to use a solderless breadboard, </text:span><text:span text:style-name="T6">basic</text:span><text:span text:style-name="T5"> concept</text:span><text:span text:style-name="T6">s</text:span><text:span text:style-name="T5"> of </text:span><text:span text:style-name="T7">schematic diagrams, </text:span><text:span text:style-name="T5">series circuits, </text:span><text:span text:style-name="T4">and how to read resistor color bands</text:span><text:span text:style-name="T5">.</text:span></text:p>
      <text:p text:style-name="P2"><text:span text:style-name="T3">The s</text:span><text:span text:style-name="T8">kills </text:span>learned here <text:span text:style-name="T3">will </text:span><text:span text:style-name="T8">serve as</text:span><text:span text:style-name="T9"> a foundation for</text:span> future <text:span text:style-name="T10">endeavors</text:span>, like the Arduino microcontroller series <text:span text:style-name="T10">of activities</text:span>.</text:p>
      <text:h text:style-name="Heading_20_1" text:outline-level="1">Materials Needed</text:h>
      <text:p text:style-name="P3">1 <text:span text:style-name="T11">or more</text:span> LED<text:span text:style-name="T11">s</text:span>. Red, green, yellow <text:span text:style-name="T12">and blue</text:span> <text:span text:style-name="T11">make a</text:span> good start.</text:p>
      <text:p text:style-name="P3">1 220<text:span text:style-name="T13">Ω</text:span> resistor. Color bands: red, red, brown.</text:p>
      <text:p text:style-name="P4">1 180<text:span text:style-name="T14">Ω</text:span> resistor. <text:span text:style-name="T4">Color bands: brown, gray, brown.</text:span></text:p>
      <text:p text:style-name="P4">1 150<text:span text:style-name="T14">Ω</text:span> resistor. <text:span text:style-name="T4">Color bands: brown, green, brown.</text:span></text:p>
      <text:p text:style-name="P3">1 5 volt power source.</text:p>
      <text:p text:style-name="P3">1 Solderless breadboard.</text:p>
      <text:p text:style-name="P5">1 Multimeter <text:span text:style-name="T15">(set to measure zero to 20V if manual range</text:span>.<text:span text:style-name="T15">)</text:span></text:p>
      <text:p text:style-name="P5">1 Set of multimeter leads.</text:p>
      <text:p text:style-name="P6">Dry-erase board or paper and pencil for drawing.</text:p>
      <text:p text:style-name="P7">Safety glasses or goggles for each participant.</text:p>
      <text:h text:style-name="Heading_20_1" text:outline-level="1">Facilitator Setup</text:h>
      <text:p text:style-name="Text_20_body">The person running the activity should set up a circuit ahead of time for a reference. <text:span text:style-name="T16">The schematic and board layout are shown below. </text:span><text:span text:style-name="T11">Start with a Red LED.</text:span></text:p>
      <table:table table:name="Table1" table:style-name="Table1">
        <table:table-column table:style-name="Table1.A"/>
        <table:table-column table:style-name="Table1.B"/>
        <text:soft-page-break/>
        <table:table-row>
          <table:table-cell table:style-name="Table1.A1" office:value-type="string">
            <text:p text:style-name="P8"><draw:frame draw:style-name="fr1" draw:name="Image1" text:anchor-type="char" svg:width="3.3862in" svg:height="1.9882in" draw:z-index="13"><draw:image xlink:href="Pictures/10000001000003F30000029987CDE48A.png" xlink:type="simple" xlink:show="embed" xlink:actuate="onLoad" draw:mime-type="image/png"/></draw:frame>TP is an abbreviation for test point. <text:span text:style-name="T17">GND is ground.</text:span></text:p>
          </table:table-cell>
          <table:table-cell table:style-name="Table1.A1" office:value-type="string">
            <text:p text:style-name="P9">TODO: Insert board photo here.</text:p>
          </table:table-cell>
        </table:table-row>
      </table:table>
      <text:p text:style-name="Text_20_body"/>
      <text:h text:style-name="Heading_20_1" text:outline-level="1"><text:span text:style-name="T17">Show and Tell </text:span>Activity</text:h>
      <text:p text:style-name="P6">Participants gather around the facilitator’s LED circuit. The facilitator should draw the circuit and briefly explain the flow of current from the positive terminal of the power supply, through the resistor, through the LED, and back to the ground terminal of the power supply.</text:p>
      <text:p text:style-name="P6">Use the multimeter to measure voltages at the various test points. Connect the mulimeter’s common lead to the ground terminal of the power supply. Move the multimeter’s positive lead to each test point and write down the voltage.</text:p>
      <text:h text:style-name="Heading_20_1" text:outline-level="1">Hands-On Activity</text:h>
      <text:p text:style-name="P10"><text:span text:style-name="T11">Have participants organize into groups of two or three. Pass out supplies to each group. </text:span><text:span text:style-name="T5">Each group builds the circuit to light their LED, with facilitator troubleshooting as needed.</text:span></text:p>
      <text:p text:style-name="P4">Participants take turns using the multimeter to measure voltages.</text:p>
      <text:h text:style-name="Heading_20_1" text:outline-level="1">Intermediate Activity</text:h>
      <text:p text:style-name="P4">Have each group replace their red LED with another color. Repeat the <text:span text:style-name="T4">test point voltage</text:span> measurements and write them down. <text:span text:style-name="T4">Ask participants what conclusions they can draw by comparing these measurements to their original red LED measurements.</text:span></text:p>
      <text:p text:style-name="P4">The facilitator explains that different colors have different voltages across the LED. Red is generally the lowest and blue is the highest. This <text:span text:style-name="T4">means</text:span> a different resistor value <text:span text:style-name="T4">is needed </text:span>to get the same brightness from each color.</text:p>
      <text:h text:style-name="Heading_20_1" text:outline-level="1">Advanced Activity</text:h>
      <text:p text:style-name="P11">If participants are comfortable with basic algebra concepts, the facilitator may <text:span text:style-name="T18">wish</text:span> to explain Ohm’s Law <text:span text:style-name="T19">and how to calculate current in the circuit by using the resistor value and the voltage measured across it (with multimeter leads attached to TP1 and TP2.)</text:span></text:p>
      <text:p text:style-name="P12"><text:soft-page-break/>Explain how current is the same in all parts of a series circuit, so the current through the resistor is the same as the current through the LED. Also explain that a current of 20 milliamps is often used as a target for good brightness.</text:p>
      <text:p text:style-name="P12">Have participants swap out resistor values for their circuits to get as close to 20mA as they can without going over. Red LEDs should have the highest resistor values and blue, the lowest.</text:p>
      <text:h text:style-name="Heading_20_1" text:outline-level="1">Expert Activity</text:h>
      <text:p text:style-name="P12">Have participants attach multiple LED/resistor combinations in parallel. Measure voltages across resistors. Get as close to 20mA for each branch of LED/resistor as possible. Facilitator can introduce the concept of parallel circuits and how the voltage across each LED/resistor pair will be the same, because they are in parallel, but the currents will be different depending on the resistor value.</text:p>
      <text:p text:style-name="P12">If participants are okay with the math, explain how power can be calculated and determine the wattage needed to get good brightness from each LED.</text:p>
      <text:h text:style-name="Heading_20_1" text:outline-level="1">Mad Science Activity</text:h>
      <text:p text:style-name="P12">The facilitator will sacrifice an LED in the name of science. Preferably use a red LED, as these are more common and cheaper. <text:span text:style-name="T20">This will burn out the LED. Safety glasses are </text:span><text:span text:style-name="T21">highly</text:span><text:span text:style-name="T20"> recommended.</text:span></text:p>
      <text:p text:style-name="P12">Apply power to light up the facilitator’s circuit. Replace the 220<text:span text:style-name="T22">Ω</text:span><text:span text:style-name="T23"> </text:span><text:span text:style-name="T24">resistor with a 150</text:span><text:span text:style-name="T25">Ω</text:span><text:span text:style-name="T24"> resistor. Measure the voltage across the resistor and calculate the current for the circuit. Reminding participants the current through the resistor is also the current through the LED. How many milliamps is it?</text:span></text:p>
      <text:p text:style-name="P13">If the LED is still surviving, <text:span text:style-name="T21">remove the LED and replace it with a length of wire. See how long it takes to burn out the LED. When the LED is no longer functioning, remove power from the circuit and recycle the LED.</text:span></text:p>
      <text:h text:style-name="Heading_20_1" text:outline-level="1">Sample Chart for Recording Voltages</text:h>
      <table:table table:name="Table2" table:style-name="Table2">
        <table:table-column table:style-name="Table2.A" table:number-columns-repeated="5"/>
        <table:table-column table:style-name="Table2.F"/>
        <table:table-row>
          <table:table-cell table:style-name="Table2.A1" office:value-type="string">
            <text:p text:style-name="P14">LED color</text:p>
          </table:table-cell>
          <table:table-cell table:style-name="Table2.A1" office:value-type="string">
            <text:p text:style-name="P14">TP1</text:p>
          </table:table-cell>
          <table:table-cell table:style-name="Table2.A1" office:value-type="string">
            <text:p text:style-name="P14">TP2</text:p>
          </table:table-cell>
          <table:table-cell table:style-name="Table2.A1" office:value-type="string">
            <text:p text:style-name="P14">TP3</text:p>
          </table:table-cell>
          <table:table-cell table:style-name="Table2.A1" office:value-type="string">
            <text:p text:style-name="P14">R1 (calculated)</text:p>
          </table:table-cell>
          <table:table-cell table:style-name="Table2.F1" office:value-type="string">
            <text:p text:style-name="P14">D1 (calculated)</text:p>
          </table:table-cell>
        </table:table-row>
        <table:table-row>
          <table:table-cell table:style-name="Table2.A2" office:value-type="string">
            <text:p text:style-name="P14">Red</text:p>
          </table:table-cell>
          <table:table-cell table:style-name="Table2.A2" office:value-type="string">
            <text:p text:style-name="P14">5V</text:p>
          </table:table-cell>
          <table:table-cell table:style-name="Table2.A2" office:value-type="string">
            <text:p text:style-name="P14">1.7V</text:p>
          </table:table-cell>
          <table:table-cell table:style-name="Table2.A2" office:value-type="string">
            <text:p text:style-name="P14">0V</text:p>
          </table:table-cell>
          <table:table-cell table:style-name="Table2.A2" office:value-type="string">
            <text:p text:style-name="P14">3.3V</text:p>
          </table:table-cell>
          <table:table-cell table:style-name="Table2.F2" office:value-type="string">
            <text:p text:style-name="P14">1.7V</text:p>
          </table:table-cell>
        </table:table-row>
        <table:table-row>
          <table:table-cell table:style-name="Table2.A2" office:value-type="string">
            <text:p text:style-name="P14">Yellow</text:p>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F2" office:value-type="string">
            <text:p text:style-name="P14"/>
          </table:table-cell>
        </table:table-row>
        <table:table-row>
          <table:table-cell table:style-name="Table2.A2" office:value-type="string">
            <text:p text:style-name="P14">Green</text:p>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F2" office:value-type="string">
            <text:p text:style-name="P14"/>
          </table:table-cell>
        </table:table-row>
        <table:table-row>
          <table:table-cell table:style-name="Table2.A2" office:value-type="string">
            <text:p text:style-name="P14">Blue</text:p>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F2" office:value-type="string">
            <text:p text:style-name="P14"/>
          </table:table-cell>
        </table:table-row>
      </table:table>
      <text:p text:style-name="Text_20_body"/>
      <text:h text:style-name="P15" text:outline-level="1">Formulas</text:h>
      <text:p text:style-name="P16">Some useful formulas for the advanced and expert activities.</text:p>
      <text:h text:style-name="Heading_20_2" text:outline-level="2"><text:soft-page-break/>Calculating current from voltage and resistance</text:h>
      <text:p text:style-name="P16">I = V / R, where I is current, V is voltage, and R is resistance.</text:p>
      <text:p text:style-name="P16">I = E / R (an alternate way you might see it, where E is electromotive force a.k.a. voltage.)</text:p>
      <text:h text:style-name="Heading_20_2" text:outline-level="2">Calculating power from voltage and current</text:h>
      <text:p text:style-name="P16">P = V x I, where V is voltage, and I is current.</text:p>
      <text:p text:style-name="P16">P = I x E (an easy way to remember, because it spells PI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text-properties fo:font-family="'Liberation Sans'" style:font-family-generic="roman" style:font-pitch="variable" fo:font-size="1pt" style:font-family-asian="'Liberation Sans'" style:font-family-generic-asian="system" style:font-pitch-asian="variable" style:font-family-complex="'Liberation Sans'" style:font-family-generic-complex="system" style:font-pitch-complex="variable"/>
    </style:style>
    <style:style style:name="MP2" style:family="paragraph">
      <loext:graphic-properties draw:fill="solid" draw:fill-color="#c0c0c0" draw:opacity="50%"/>
      <style:paragraph-properties style:writing-mode="lr-tb"/>
      <style:text-properties fo:font-family="'Liberation Sans'" style:font-family-generic="roman" style:font-pitch="variable" fo:font-size="1pt" style:font-family-asian="'Liberation Sans'" style:font-family-generic-asian="system" style:font-pitch-asian="variable" style:font-family-complex="'Liberation Sans'" style:font-family-generic-complex="system" style:font-pitch-complex="variable"/>
    </style:style>
    <style:style style:name="Mgr1" style:family="graphic">
      <style:graphic-properties draw:stroke="none" draw:fill="solid" draw:fill-color="#c0c0c0" draw:opacity="50%" draw:auto-grow-height="false" draw:auto-grow-width="false" fo:min-height="0.7689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0.49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0.8126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3" draw:name="PowerPlusWaterMarkObject" draw:style-name="Mgr1" draw:text-style-name="MP2" svg:width="6.9248in" svg:height="0.7685in" draw:transform="rotate (0.785398163397448) translate (0.742361111111111in 6.79034886264217in)"><text:p text:style-name="MP1">Untested Draft Vers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First_20_Page" style:display-name="First Page" style:page-layout-name="Mpm1" draw:style-name="Mdp1" style:next-style-name="Standard">
      <style:header>
        <text:p text:style-name="Header"><draw:custom-shape text:anchor-type="char" draw:z-index="4" draw:name="PowerPlusWaterMarkObject" draw:style-name="Mgr1" draw:text-style-name="MP2" svg:width="6.9248in" svg:height="0.7685in" draw:transform="rotate (0.785398163397448)"><text:p text:style-name="MP1">Untested Draft Vers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Left_20_Page" style:display-name="Left Page" style:page-layout-name="Mpm2" draw:style-name="Mdp1" style:next-style-name="Right_20_Page">
      <style:header>
        <text:p text:style-name="Header"><draw:custom-shape text:anchor-type="char" draw:z-index="5" draw:name="PowerPlusWaterMarkObject" draw:style-name="Mgr1" draw:text-style-name="MP2" svg:width="6.9248in" svg:height="0.7685in" draw:transform="rotate (0.785398163397448)"><text:p text:style-name="MP1">Untested Draft Vers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Right_20_Page" style:display-name="Right Page" style:page-layout-name="Mpm3" draw:style-name="Mdp1" style:next-style-name="Left_20_Page">
      <style:header>
        <text:p text:style-name="Header"><draw:custom-shape text:anchor-type="char" draw:z-index="6" draw:name="PowerPlusWaterMarkObject" draw:style-name="Mgr1" draw:text-style-name="MP2" svg:width="6.9248in" svg:height="0.7685in" draw:transform="rotate (0.785398163397448)"><text:p text:style-name="MP1">Untested Draft Vers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velope" style:page-layout-name="Mpm4" draw:style-name="Mdp1">
      <style:header>
        <text:p text:style-name="Header"><draw:custom-shape text:anchor-type="char" draw:z-index="7" draw:name="PowerPlusWaterMarkObject" draw:style-name="Mgr2" draw:text-style-name="MP2" svg:width="4.4878in" svg:height="0.4976in" draw:transform="rotate (0.785398163397448)"><text:p text:style-name="MP1">Untested Draft Vers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Index" style:page-layout-name="Mpm1" draw:style-name="Mdp1">
      <style:header>
        <text:p text:style-name="Header"><draw:custom-shape text:anchor-type="char" draw:z-index="8" draw:name="PowerPlusWaterMarkObject" draw:style-name="Mgr1" draw:text-style-name="MP2" svg:width="6.9248in" svg:height="0.7685in" draw:transform="rotate (0.785398163397448)"><text:p text:style-name="MP1">Untested Draft Vers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HTML" style:page-layout-name="Mpm5" draw:style-name="Mdp1">
      <style:header>
        <text:p text:style-name="Header"><draw:custom-shape text:anchor-type="char" draw:z-index="9" draw:name="PowerPlusWaterMarkObject" draw:style-name="Mgr3" draw:text-style-name="MP2" svg:width="7.3185in" svg:height="0.8122in" draw:transform="rotate (0.785398163397448)"><text:p text:style-name="MP1">Untested Draft Vers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Footnote" style:page-layout-name="Mpm6" draw:style-name="Mdp1">
      <style:header>
        <text:p text:style-name="Header"><draw:custom-shape text:anchor-type="char" draw:z-index="10" draw:name="PowerPlusWaterMarkObject" draw:style-name="Mgr1" draw:text-style-name="MP2" svg:width="6.9248in" svg:height="0.7685in" draw:transform="rotate (0.785398163397448)"><text:p text:style-name="MP1">Untested Draft Vers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dnote" style:page-layout-name="Mpm6" draw:style-name="Mdp1">
      <style:header>
        <text:p text:style-name="Header"><draw:custom-shape text:anchor-type="char" draw:z-index="11" draw:name="PowerPlusWaterMarkObject" draw:style-name="Mgr1" draw:text-style-name="MP2" svg:width="6.9248in" svg:height="0.7685in" draw:transform="rotate (0.785398163397448)"><text:p text:style-name="MP1">Untested Draft Vers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Landscape" style:page-layout-name="Mpm7" draw:style-name="Mdp1">
      <style:header>
        <text:p text:style-name="Header"><draw:custom-shape text:anchor-type="char" draw:z-index="12" draw:name="PowerPlusWaterMarkObject" draw:style-name="Mgr1" draw:text-style-name="MP2" svg:width="6.9248in" svg:height="0.7685in" draw:transform="rotate (0.785398163397448)"><text:p text:style-name="MP1">Untested Draft Vers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18T11:54:49.205926300</meta:creation-date>
    <dc:date>2026-05-22T17:22:26.872240300</dc:date>
    <meta:editing-duration>PT1H57M47S</meta:editing-duration>
    <meta:editing-cycles>25</meta:editing-cycles>
    <meta:generator>LibreOffice/26.2.1.2$Windows_X86_64 LibreOffice_project/620$Build-2</meta:generator>
    <meta:print-date>2026-05-21T13:53:06.870231500</meta:print-date>
    <meta:printed-by>PDF files</meta:printed-by>
    <meta:document-statistic meta:table-count="2" meta:image-count="1" meta:object-count="0" meta:page-count="4" meta:paragraph-count="64" meta:word-count="869" meta:character-count="5085" meta:non-whitespace-character-count="4280"/>
  </office:meta>
</office:document-meta>
</file>